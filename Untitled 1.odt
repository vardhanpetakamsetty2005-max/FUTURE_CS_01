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9B4D91F9572ED01CE2.png" manifest:media-type="image/png"/>
  <manifest:file-entry manifest:full-path="Pictures/10000000000007800000039B4EB264BDEE108F34.png" manifest:media-type="image/png"/>
  <manifest:file-entry manifest:full-path="Pictures/10000000000007800000039B00B225D0E75B4B7E.png" manifest:media-type="image/png"/>
  <manifest:file-entry manifest:full-path="Pictures/10000000000007800000039B2EE6A006977303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enter align" svg:font-family="'Center align'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 new roman" svg:font-family="'time new roman'"/>
  </office:font-face-decls>
  <office:automatic-styles>
    <style:style style:name="Table1" style:family="table">
      <style:table-properties style:width="10.809cm" table:align="left"/>
    </style:style>
    <style:style style:name="Table1.A" style:family="table-column">
      <style:table-column-properties style:column-width="4.549cm"/>
    </style:style>
    <style:style style:name="Table1.B" style:family="table-column">
      <style:table-column-properties style:column-width="6.2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236cm" table:align="left"/>
    </style:style>
    <style:style style:name="Table2.A" style:family="table-column">
      <style:table-column-properties style:column-width="4.69cm"/>
    </style:style>
    <style:style style:name="Table2.B" style:family="table-column">
      <style:table-column-properties style:column-width="2.103cm"/>
    </style:style>
    <style:style style:name="Table2.C" style:family="table-column">
      <style:table-column-properties style:column-width="7.44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24pt" officeooo:rsid="00045cb2" officeooo:paragraph-rsid="00045cb2" style:font-size-asian="24pt" style:font-size-complex="24pt"/>
    </style:style>
    <style:style style:name="P2" style:family="paragraph" style:parent-style-name="Standard">
      <style:text-properties officeooo:paragraph-rsid="00045cb2"/>
    </style:style>
    <style:style style:name="P3" style:family="paragraph" style:parent-style-name="Text_20_body">
      <style:text-properties officeooo:rsid="00045cb2" officeooo:paragraph-rsid="00045cb2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7"/>Vulnerability Assessment Report</text:h>
      <text:h text:style-name="Heading_20_2" text:outline-level="2">Target Website</text:h>
      <text:p text:style-name="Text_20_body"><text:a xlink:type="simple" xlink:href="https://demo.testfire.net/" text:style-name="Internet_20_link" text:visited-style-name="Visited_20_Internet_20_Link">https://demo.testfire.net</text:a></text:p>
      <text:p text:style-name="Horizontal_20_Line"/>
      <text:h text:style-name="Heading_20_3" text:outline-level="3">Prepared By</text:h>
      <text:p text:style-name="Text_20_body"><text:span text:style-name="Strong_20_Emphasis">Vardhan</text:span></text:p>
      <text:h text:style-name="Heading_20_3" text:outline-level="3">Internship</text:h>
      <text:p text:style-name="Text_20_body"><text:span text:style-name="Strong_20_Emphasis">Future Interns Cyber Security Internship</text:span></text:p>
      <text:h text:style-name="Heading_20_3" text:outline-level="3">Tools Used</text:h>
      <text:list xml:id="list1703885080" text:style-name="L1">
        <text:list-item>
          <text:p text:style-name="P4">OWASP ZAP</text:p>
        </text:list-item>
        <text:list-item>
          <text:p text:style-name="P4">Nmap</text:p>
        </text:list-item>
        <text:list-item>
          <text:p text:style-name="P4">Browser Developer Tools</text:p>
        </text:list-item>
        <text:list-item>
          <text:p text:style-name="P4">Parrot OS</text:p>
        </text:list-item>
      </text:list>
      <text:h text:style-name="Heading_20_3" text:outline-level="3" text:is-list-header="true">Year</text:h>
      <text:p text:style-name="Text_20_body"><text:span text:style-name="Strong_20_Emphasis">2026</text:span></text:p>
      <text:p text:style-name="Text_20_body"><text:span text:style-name="Strong_20_Emphasis"/></text:p>
      <text:p text:style-name="Text_20_body"><text:span text:style-name="Strong_20_Emphasis"/></text:p>
      <text:p text:style-name="Horizontal_20_Line"/>
      <text:h text:style-name="Heading_20_1" text:outline-level="1">INTRODUCTION</text:h>
      <text:p text:style-name="Text_20_body"/>
      <text:p text:style-name="Text_20_body">This report presents a passive vulnerability assessment conducted on the intentionally vulnerable banking website <text:span text:style-name="Strong_20_Emphasis">demo.testfire.net</text:span>.</text:p>
      <text:p text:style-name="Text_20_body">The assessment was performed using ethical and non-destructive testing techniques to identify common security weaknesses including insecure headers, open ports, and cookie-related vulnerabilities.</text:p>
      <text:p text:style-name="Text_20_body">The testing focused on passive analysis methods using OWASP ZAP, Nmap, and browser developer tools to evaluate the overall security posture of the target application.</text:p>
      <text:p text:style-name="Text_20_body">No exploitation or harmful activities were performed during testing.</text:p>
      <text:p text:style-name="Text_20_body"/>
      <text:h text:style-name="Heading_20_1" text:outline-level="1"><text:soft-page-break/>OBJECTIVES</text:h>
      <text:list xml:id="list221932556" text:style-name="L2">
        <text:list-item>
          <text:p text:style-name="P5">Perform passive vulnerability scanning</text:p>
        </text:list-item>
        <text:list-item>
          <text:p text:style-name="P5">Identify open ports and active services</text:p>
        </text:list-item>
        <text:list-item>
          <text:p text:style-name="P5">Analyze HTTP security headers</text:p>
        </text:list-item>
        <text:list-item>
          <text:p text:style-name="P5">Review cookie security configurations</text:p>
        </text:list-item>
        <text:list-item>
          <text:p text:style-name="P5">Detect common web application weaknesses</text:p>
        </text:list-item>
        <text:list-item>
          <text:p text:style-name="P5">Recommend security improvements</text:p>
        </text:list-item>
      </text:list>
      <text:p text:style-name="Horizontal_20_Line"/>
      <text:h text:style-name="Heading_20_1" text:outline-level="1">TOOLS USED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3930656977072">
            <table:table-cell table:style-name="Table1.A1" office:value-type="string">
              <text:p text:style-name="Table_20_Heading">Tool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 table:style-name="TableLine93930656977072">
          <table:table-cell table:style-name="Table1.A1" office:value-type="string">
            <text:p text:style-name="Table_20_Contents">OWASP ZAP</text:p>
          </table:table-cell>
          <table:table-cell table:style-name="Table1.A1" office:value-type="string">
            <text:p text:style-name="Table_20_Contents">Passive vulnerability scanning</text:p>
          </table:table-cell>
        </table:table-row>
        <table:table-row table:style-name="TableLine93930656977072">
          <table:table-cell table:style-name="Table1.A1" office:value-type="string">
            <text:p text:style-name="Table_20_Contents">Nmap</text:p>
          </table:table-cell>
          <table:table-cell table:style-name="Table1.A1" office:value-type="string">
            <text:p text:style-name="Table_20_Contents">Port scanning and service detection</text:p>
          </table:table-cell>
        </table:table-row>
        <table:table-row table:style-name="TableLine93930656977072">
          <table:table-cell table:style-name="Table1.A1" office:value-type="string">
            <text:p text:style-name="Table_20_Contents">Browser Developer Tools</text:p>
          </table:table-cell>
          <table:table-cell table:style-name="Table1.A1" office:value-type="string">
            <text:p text:style-name="Table_20_Contents">Security header analysis</text:p>
          </table:table-cell>
        </table:table-row>
        <table:table-row table:style-name="TableLine93930656977072">
          <table:table-cell table:style-name="Table1.A1" office:value-type="string">
            <text:p text:style-name="Table_20_Contents">Parrot OS</text:p>
          </table:table-cell>
          <table:table-cell table:style-name="Table1.A1" office:value-type="string">
            <text:p text:style-name="Table_20_Contents">Security testing environment</text:p>
          </table:table-cell>
        </table:table-row>
      </table:table>
      <text:p text:style-name="Horizontal_20_Line"/>
      <text:h text:style-name="Heading_20_1" text:outline-level="1">NMAP SCAN RESULTS</text:h>
      <text:p text:style-name="Text_20_body"/>
      <text:p text:style-name="Text_20_body">An Nmap scan was performed against the target website to identify open ports and active services.</text:p>
      <text:p text:style-name="Text_20_body">The scan identified active HTTP and HTTPS services running on the server. These services indicate that the application is accessible through standard web communication protocols.</text:p>
      <text:h text:style-name="Heading_20_3" text:outline-level="3">Figure 1: Nmap Scan Output</text:h>
      <text:p text:style-name="Text_20_body"/>
      <text:p text:style-name="Quotations"><draw:frame draw:style-name="fr1" draw:name="Image1" text:anchor-type="char" svg:width="15cm" svg:height="7.211cm" draw:z-index="0"><draw:image xlink:href="Pictures/10000000000007800000039B2EE6A00697730361.png" xlink:type="simple" xlink:show="embed" xlink:actuate="onLoad" draw:mime-type="image/png"/></draw:frame></text:p>
      <text:h text:style-name="Heading_20_1" text:outline-level="1"><text:soft-page-break/>OWASP ZAP FINDINGS</text:h>
      <text:p text:style-name="Text_20_body"/>
      <text:p text:style-name="Text_20_body">A passive vulnerability assessment was performed using OWASP ZAP to identify common security weaknesses within the target application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3930655642896">
            <table:table-cell table:style-name="Table2.A1" office:value-type="string">
              <text:p text:style-name="Table_20_Heading">Vulnerability</text:p>
            </table:table-cell>
            <table:table-cell table:style-name="Table2.A1" office:value-type="string">
              <text:p text:style-name="Table_20_Heading">Risk Level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 table:style-name="TableLine93930655642896">
          <table:table-cell table:style-name="Table2.A1" office:value-type="string">
            <text:p text:style-name="Table_20_Contents">Missing CSP Header</text:p>
          </table:table-cell>
          <table:table-cell table:style-name="Table2.A1" office:value-type="string">
            <text:p text:style-name="Table_20_Contents">Medium</text:p>
          </table:table-cell>
          <table:table-cell table:style-name="Table2.A1" office:value-type="string">
            <text:p text:style-name="Table_20_Contents">Missing protection against XSS attacks</text:p>
          </table:table-cell>
        </table:table-row>
        <table:table-row table:style-name="TableLine93930655642896">
          <table:table-cell table:style-name="Table2.A1" office:value-type="string">
            <text:p text:style-name="Table_20_Contents">Missing X-Frame-Options</text:p>
          </table:table-cell>
          <table:table-cell table:style-name="Table2.A1" office:value-type="string">
            <text:p text:style-name="Table_20_Contents">Medium</text:p>
          </table:table-cell>
          <table:table-cell table:style-name="Table2.A1" office:value-type="string">
            <text:p text:style-name="Table_20_Contents">Potential clickjacking vulnerability</text:p>
          </table:table-cell>
        </table:table-row>
        <table:table-row table:style-name="TableLine93930655642896">
          <table:table-cell table:style-name="Table2.A1" office:value-type="string">
            <text:p text:style-name="Table_20_Contents">Cookie Without HttpOnly</text:p>
          </table:table-cell>
          <table:table-cell table:style-name="Table2.A1" office:value-type="string">
            <text:p text:style-name="Table_20_Contents">Low</text:p>
          </table:table-cell>
          <table:table-cell table:style-name="Table2.A1" office:value-type="string">
            <text:p text:style-name="Table_20_Contents">Cookies may be accessible through scripts</text:p>
          </table:table-cell>
        </table:table-row>
        <table:table-row table:style-name="TableLine93930655642896">
          <table:table-cell table:style-name="Table2.A1" office:value-type="string">
            <text:p text:style-name="Table_20_Contents">Information Disclosure</text:p>
          </table:table-cell>
          <table:table-cell table:style-name="Table2.A1" office:value-type="string">
            <text:p text:style-name="Table_20_Contents">Low</text:p>
          </table:table-cell>
          <table:table-cell table:style-name="Table2.A1" office:value-type="string">
            <text:p text:style-name="Table_20_Contents">Sensitive server details may be exposed</text:p>
          </table:table-cell>
        </table:table-row>
      </table:table>
      <text:h text:style-name="Heading_20_3" text:outline-level="3">Figure 2: OWASP ZAP Alerts Overview</text:h>
      <text:p text:style-name="Text_20_body"/>
      <text:p text:style-name="Quotations"><draw:frame draw:style-name="fr2" draw:name="Image2" text:anchor-type="char" svg:width="15cm" svg:height="7.211cm" draw:z-index="1"><draw:image xlink:href="Pictures/10000000000007800000039B4EB264BDEE108F34.png" xlink:type="simple" xlink:show="embed" xlink:actuate="onLoad" draw:mime-type="image/png"/></draw:frame></text:p>
      <text:h text:style-name="Heading_20_3" text:outline-level="3">Figure 3: Medium Risk Vulnerability Findings</text:h>
      <text:p text:style-name="Quotations"/>
      <text:p text:style-name="Quotations"><draw:frame draw:style-name="fr1" draw:name="Image3" text:anchor-type="char" svg:width="15cm" svg:height="7.211cm" draw:z-index="2"><draw:image xlink:href="Pictures/10000000000007800000039B4D91F9572ED01CE2.png" xlink:type="simple" xlink:show="embed" xlink:actuate="onLoad" draw:mime-type="image/png"/></draw:frame></text:p>
      <text:h text:style-name="Heading_20_1" text:outline-level="1"><text:soft-page-break/>SECURITY HEADER ANALYSIS</text:h>
      <text:p text:style-name="Text_20_body"/>
      <text:p text:style-name="Text_20_body">The assessment identified missing security headers including Content-Security-Policy and X-Frame-Options.</text:p>
      <text:p text:style-name="Text_20_body">These missing protections may increase the risk of Cross-Site Scripting (XSS) and clickjacking attacks within the application.</text:p>
      <text:h text:style-name="Heading_20_3" text:outline-level="3">Figure 4: Browser Header Analysis</text:h>
      <text:p text:style-name="Text_20_body"/>
      <text:p text:style-name="Quotations"><draw:frame draw:style-name="fr1" draw:name="Image4" text:anchor-type="char" svg:width="15cm" svg:height="7.211cm" draw:z-index="3"><draw:image xlink:href="Pictures/10000000000007800000039B00B225D0E75B4B7E.png" xlink:type="simple" xlink:show="embed" xlink:actuate="onLoad" draw:mime-type="image/png"/></draw:frame></text:p>
      <text:p text:style-name="Horizontal_20_Line"/>
      <text:h text:style-name="Heading_20_1" text:outline-level="1">RECOMMENDATIONS</text:h>
      <text:p text:style-name="Text_20_body"/>
      <text:list xml:id="list3370870291" text:style-name="L3">
        <text:list-item>
          <text:p text:style-name="P6">Implement Content-Security-Policy (CSP) headers</text:p>
        </text:list-item>
        <text:list-item>
          <text:p text:style-name="P6">Enable Strict-Transport-Security (HSTS)</text:p>
        </text:list-item>
        <text:list-item>
          <text:p text:style-name="P6">Configure Secure and HttpOnly cookie attributes</text:p>
        </text:list-item>
        <text:list-item>
          <text:p text:style-name="P6">Add X-Frame-Options protection</text:p>
        </text:list-item>
        <text:list-item>
          <text:p text:style-name="P6">Redirect all traffic to HTTPS</text:p>
        </text:list-item>
        <text:list-item>
          <text:p text:style-name="P6">Regularly monitor and update server configurations</text:p>
        </text:list-item>
      </text:list>
      <text:h text:style-name="Heading_20_1" text:outline-level="1"><text:soft-page-break/></text:h>
      <text:h text:style-name="Heading_20_1" text:outline-level="1">CONCLUSION</text:h>
      <text:p text:style-name="Text_20_body">The passive vulnerability assessment identified several low and medium-level security weaknesses within the target application.</text:p>
      <text:p text:style-name="Text_20_body">The testing was conducted ethically using non-destructive methods. The identified issues can be mitigated through stronger security configurations, proper security headers, and secure cookie implementation.</text:p>
      <text:p text:style-name="Text_20_body">This assessment demonstrates the importance of proactive security analysis in maintaining secure web applications.</text:p>
      <text:h text:style-name="Heading_20_1" text:outline-level="1" text:is-list-header="true"><text:span text:style-name="Source_20_Text"/></text:h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enter align" svg:font-family="'Center align'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 new roman" svg:font-family="'time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6:41:04.710125228</meta:creation-date>
    <dc:date>2026-05-25T19:53:08.925513697</dc:date>
    <meta:editing-duration>PT6M2S</meta:editing-duration>
    <meta:editing-cycles>1</meta:editing-cycles>
    <meta:document-statistic meta:table-count="2" meta:image-count="4" meta:object-count="0" meta:page-count="5" meta:paragraph-count="75" meta:word-count="407" meta:character-count="3048" meta:non-whitespace-character-count="2725"/>
    <meta:generator>LibreOffice/7.3.3.1$Linux_X86_64 LibreOffice_project/30$Build-1</meta:generator>
  </office:meta>
</office:document-meta>
</file>